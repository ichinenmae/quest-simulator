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4.639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0.497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0.517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 style:data-style-name="N112">
      <style:table-cell-properties fo:border="0.74pt solid #000000"/>
      <style:text-properties fo:color="#c9211e" fo:font-weight="bold" style:font-weight-asian="bold" style:font-weight-complex="bold"/>
    </style:style>
    <style:style style:name="ce6" style:family="table-cell" style:parent-style-name="Default" style:data-style-name="N112">
      <style:table-cell-properties fo:border="0.74pt solid #000000"/>
    </style:style>
    <style:style style:name="ce8" style:family="table-cell" style:parent-style-name="Default" style:data-style-name="N103">
      <style:table-cell-properties fo:border="0.74pt solid #000000"/>
    </style:style>
    <style:style style:name="ce7" style:family="table-cell" style:parent-style-name="Default" style:data-style-name="N103">
      <style:table-cell-properties fo:border="0.74pt solid #000000"/>
      <style:text-properties fo:color="#c9211e" fo:font-weight="bold" style:font-weight-asian="bold" style:font-weight-complex="bold"/>
    </style:style>
    <style:style style:name="ce4" style:family="table-cell" style:parent-style-name="Default" style:data-style-name="N103"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61"/>
    <style:style style:name="ce13" style:family="table-cell" style:parent-style-name="Default" style:data-style-name="N112"/>
    <style:style style:name="ce1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8"/>
        <table:table-column table:style-name="co6" table:default-cell-style-name="ce1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月～木</text:p>
          </table:table-cell>
          <table:table-cell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稼働日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日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稼働時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時間/日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想定単価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6"/>
          <table:table-cell table:style-name="ce4"/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跨ぎクエ</text:p>
          </table:table-cell>
          <table:table-cell office:value-type="string" calcext:value-type="string">
            <text:p>クエスト件数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回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件数（追加）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回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日当たりの目標件数</text:p>
          </table:table-cell>
          <table:table-cell table:style-name="ce5" table:formula="of:=[.D7]/[.D2]" office:value-type="float" office:value="33.3333333333333" calcext:value-type="float">
            <text:p>33.3</text:p>
          </table:table-cell>
          <table:table-cell office:value-type="string" calcext:value-type="string">
            <text:p>(回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1日当たりの目標件数(追加)</text:p>
          </table:table-cell>
          <table:table-cell table:style-name="ce5" table:formula="of:=([.D7]+[.P7])/[.D2]" office:value-type="float" office:value="36.6666666666667" calcext:value-type="float">
            <text:p>36.7</text:p>
          </table:table-cell>
          <table:table-cell table:style-name="ce1" office:value-type="string" calcext:value-type="string">
            <text:p>(回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ペース</text:p>
          </table:table-cell>
          <table:table-cell table:style-name="ce6" table:formula="of:=[.D8]/[.D3]" office:value-type="float" office:value="2.77777777777778" calcext:value-type="float">
            <text:p>2.8</text:p>
          </table:table-cell>
          <table:table-cell office:value-type="string" calcext:value-type="string">
            <text:p>(回/時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ペース（追加）</text:p>
          </table:table-cell>
          <table:table-cell table:style-name="ce6" table:formula="of:=([.D7]+[.P7])/[.D3]" office:value-type="float" office:value="9.16666666666667" calcext:value-type="float">
            <text:p>9.2</text:p>
          </table:table-cell>
          <table:table-cell table:style-name="ce1" office:value-type="string" calcext:value-type="string">
            <text:p>(回/時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クエスト報酬</text:p>
          </table:table-cell>
          <table:table-cell table:style-name="ce8" office:value-type="currency" office:currency="JPY" office:value="17180" calcext:value-type="currency">
            <text:p>￥17,18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報酬(追加)</text:p>
          </table:table-cell>
          <table:table-cell table:style-name="ce8" office:value-type="currency" office:currency="JPY" office:value="1960" calcext:value-type="currency">
            <text:p>￥1,96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配達報酬</text:p>
          </table:table-cell>
          <table:table-cell table:style-name="ce7" table:formula="of:=[.D4]*[.D7]" office:value-type="currency" office:currency="JPY" office:value="32000" calcext:value-type="currency">
            <text:p>￥3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配達報酬(追加)</text:p>
          </table:table-cell>
          <table:table-cell table:style-name="ce7" table:formula="of:=[.D4]*([.D7]+[.P7])" office:value-type="currency" office:currency="JPY" office:value="35200" calcext:value-type="currency">
            <text:p>￥35,20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クエスト込み報酬</text:p>
          </table:table-cell>
          <table:table-cell table:style-name="ce7" table:formula="of:=[.D11]+[.D10]" office:value-type="currency" office:currency="JPY" office:value="49180" calcext:value-type="currency">
            <text:p>￥49,18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込み報酬(追加)</text:p>
          </table:table-cell>
          <table:table-cell table:style-name="ce7" table:formula="of:=[.P11]+[.D10]+[.P10]" office:value-type="currency" office:currency="JPY" office:value="54340" calcext:value-type="currency">
            <text:p>￥54,34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金額</text:p>
          </table:table-cell>
          <table:table-cell table:style-name="Default"/>
          <table:table-cell table:style-name="Default" office:value-type="string" calcext:value-type="string">
            <text:p>件数</text:p>
          </table:table-cell>
          <table:table-cell table:style-name="Default"/>
          <table:table-cell table:style-name="Default" office:value-type="string" calcext:value-type="string">
            <text:p>累積金額</text:p>
          </table:table-cell>
          <table:table-cell table:style-name="Default"/>
          <table:table-cell table:style-name="Default" office:value-type="string" calcext:value-type="string">
            <text:p>累積件数</text:p>
          </table:table-cell>
          <table:table-cell table:style-name="Default"/>
          <table:table-cell table:style-name="Default" office:value-type="string" calcext:value-type="string">
            <text:p>単価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謎クエ</text:p>
          </table:table-cell>
          <table:table-cell office:value-type="string" calcext:value-type="string">
            <text:p>月AM -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5])" office:value-type="currency" office:currency="JPY" office:value="350" calcext:value-type="currency">
            <text:p>￥350</text:p>
          </table:table-cell>
          <table:table-cell office:value-type="string" calcext:value-type="string">
            <text:p>(円)</text:p>
          </table:table-cell>
          <table:table-cell table:formula="of:=SUM([.F15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5]/[.J15]" office:value-type="currency" office:currency="JPY" office:value="116.666666666667" calcext:value-type="currency">
            <text:p>￥11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AM -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5:.D16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15:.F16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16]/[.J16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AM -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5:.D17])" office:value-type="currency" office:currency="JPY" office:value="1350" calcext:value-type="currency">
            <text:p>￥1,350</text:p>
          </table:table-cell>
          <table:table-cell office:value-type="string" calcext:value-type="string">
            <text:p>(円)</text:p>
          </table:table-cell>
          <table:table-cell table:formula="of:=SUM([.F15:.F17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17]/[.J17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AM -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5:.D18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15:.F18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8]/[.J18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5:.D19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15:.F19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9]/[.J19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15:.D19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PM 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2])" office:value-type="currency" office:currency="JPY" office:value="300" calcext:value-type="currency">
            <text:p>￥300</text:p>
          </table:table-cell>
          <table:table-cell office:value-type="string" calcext:value-type="string">
            <text:p>(円)</text:p>
          </table:table-cell>
          <table:table-cell table:formula="of:=SUM([.F22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22]/[.J22]" office:value-type="currency" office:currency="JPY" office:value="100" calcext:value-type="currency">
            <text:p>￥1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PM 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2:.D23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22:.F23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23]/[.J23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PM -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2:.D24])" office:value-type="currency" office:currency="JPY" office:value="1350" calcext:value-type="currency">
            <text:p>￥1,350</text:p>
          </table:table-cell>
          <table:table-cell office:value-type="string" calcext:value-type="string">
            <text:p>(円)</text:p>
          </table:table-cell>
          <table:table-cell table:formula="of:=SUM([.F22:.F24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24]/[.J24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PM -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2:.D25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22:.F25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25]/[.J25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月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22:.D26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22:.F26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26]/[.J26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22:.D26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AM -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9])" office:value-type="currency" office:currency="JPY" office:value="350" calcext:value-type="currency">
            <text:p>￥350</text:p>
          </table:table-cell>
          <table:table-cell office:value-type="string" calcext:value-type="string">
            <text:p>(円)</text:p>
          </table:table-cell>
          <table:table-cell table:formula="of:=SUM([.F29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29]/[.J29]" office:value-type="currency" office:currency="JPY" office:value="116.666666666667" calcext:value-type="currency">
            <text:p>￥11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AM -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9:.D30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29:.F30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30]/[.J30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AM -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9:.D31])" office:value-type="currency" office:currency="JPY" office:value="1350" calcext:value-type="currency">
            <text:p>￥1,350</text:p>
          </table:table-cell>
          <table:table-cell office:value-type="string" calcext:value-type="string">
            <text:p>(円)</text:p>
          </table:table-cell>
          <table:table-cell table:formula="of:=SUM([.F29:.F31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31]/[.J31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AM -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29:.D32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29:.F32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32]/[.J32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29:.D33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29:.F33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33]/[.J33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29:.D33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PM 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36])" office:value-type="currency" office:currency="JPY" office:value="300" calcext:value-type="currency">
            <text:p>￥300</text:p>
          </table:table-cell>
          <table:table-cell office:value-type="string" calcext:value-type="string">
            <text:p>(円)</text:p>
          </table:table-cell>
          <table:table-cell table:formula="of:=SUM([.F36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36]/[.J36]" office:value-type="currency" office:currency="JPY" office:value="100" calcext:value-type="currency">
            <text:p>￥1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PM 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36:.D37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36:.F37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37]/[.J37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PM -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36:.D38])" office:value-type="currency" office:currency="JPY" office:value="1350" calcext:value-type="currency">
            <text:p>￥1,350</text:p>
          </table:table-cell>
          <table:table-cell office:value-type="string" calcext:value-type="string">
            <text:p>(円)</text:p>
          </table:table-cell>
          <table:table-cell table:formula="of:=SUM([.F36:.F38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38]/[.J38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PM -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36:.D39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36:.F39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39]/[.J39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火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36:.D40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36:.F40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40]/[.J40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36:.D40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AM -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43])" office:value-type="currency" office:currency="JPY" office:value="350" calcext:value-type="currency">
            <text:p>￥350</text:p>
          </table:table-cell>
          <table:table-cell office:value-type="string" calcext:value-type="string">
            <text:p>(円)</text:p>
          </table:table-cell>
          <table:table-cell table:formula="of:=SUM([.F43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43]/[.J43]" office:value-type="currency" office:currency="JPY" office:value="116.666666666667" calcext:value-type="currency">
            <text:p>￥11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AM -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43:.D44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43:.F44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44]/[.J44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AM -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43:.D45])" office:value-type="currency" office:currency="JPY" office:value="1400" calcext:value-type="currency">
            <text:p>￥1,400</text:p>
          </table:table-cell>
          <table:table-cell office:value-type="string" calcext:value-type="string">
            <text:p>(円)</text:p>
          </table:table-cell>
          <table:table-cell table:formula="of:=SUM([.F43:.F45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45]/[.J45]" office:value-type="currency" office:currency="JPY" office:value="155.555555555556" calcext:value-type="currency">
            <text:p>￥156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A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43:.D46])" office:value-type="currency" office:currency="JPY" office:value="1400" calcext:value-type="currency">
            <text:p>￥1,400</text:p>
          </table:table-cell>
          <table:table-cell office:value-type="string" calcext:value-type="string">
            <text:p>(円)</text:p>
          </table:table-cell>
          <table:table-cell table:formula="of:=SUM([.F43:.F46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46]/[.J46]" office:value-type="currency" office:currency="JPY" office:value="116.666666666667" calcext:value-type="currency">
            <text:p>￥11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43:.D47])" office:value-type="currency" office:currency="JPY" office:value="1400" calcext:value-type="currency">
            <text:p>￥1,400</text:p>
          </table:table-cell>
          <table:table-cell office:value-type="string" calcext:value-type="string">
            <text:p>(円)</text:p>
          </table:table-cell>
          <table:table-cell table:formula="of:=SUM([.F43:.F47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47]/[.J47]" office:value-type="currency" office:currency="JPY" office:value="116.666666666667" calcext:value-type="currency">
            <text:p>￥11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43:.D47])" office:value-type="currency" office:currency="JPY" office:value="1400" calcext:value-type="currency">
            <text:p>￥1,4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PM -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円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SUM([.D50])"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SUM([.F50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50]/[.J50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PM -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0:.D51])" office:value-type="currency" office:currency="JPY" office:value="1350" calcext:value-type="currency">
            <text:p>￥1,350</text:p>
          </table:table-cell>
          <table:table-cell office:value-type="string" calcext:value-type="string">
            <text:p>(円)</text:p>
          </table:table-cell>
          <table:table-cell table:formula="of:=SUM([.F50:.F51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51]/[.J51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PM -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0:.D52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50:.F52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52]/[.J52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P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50:.D53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50:.F53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53]/[.J53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水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50:.D54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formula="of:=SUM([.F50:.F54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54]/[.J54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50:.D54])" office:value-type="currency" office:currency="JPY" office:value="2000" calcext:value-type="currency">
            <text:p>￥2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AM -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7])" office:value-type="currency" office:currency="JPY" office:value="450" calcext:value-type="currency">
            <text:p>￥450</text:p>
          </table:table-cell>
          <table:table-cell office:value-type="string" calcext:value-type="string">
            <text:p>(円)</text:p>
          </table:table-cell>
          <table:table-cell table:formula="of:=SUM([.F57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57]/[.J57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AM -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7:.D58])" office:value-type="currency" office:currency="JPY" office:value="1000" calcext:value-type="currency">
            <text:p>￥1,000</text:p>
          </table:table-cell>
          <table:table-cell office:value-type="string" calcext:value-type="string">
            <text:p>(円)</text:p>
          </table:table-cell>
          <table:table-cell table:formula="of:=SUM([.F57:.F58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58]/[.J58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AM -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7:.D59])" office:value-type="currency" office:currency="JPY" office:value="1650" calcext:value-type="currency">
            <text:p>￥1,650</text:p>
          </table:table-cell>
          <table:table-cell office:value-type="string" calcext:value-type="string">
            <text:p>(円)</text:p>
          </table:table-cell>
          <table:table-cell table:formula="of:=SUM([.F57:.F59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59]/[.J59]" office:value-type="currency" office:currency="JPY" office:value="183.333333333333" calcext:value-type="currency">
            <text:p>￥18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AM -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57:.D60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formula="of:=SUM([.F57:.F60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60]/[.J60]" office:value-type="currency" office:currency="JPY" office:value="200" calcext:value-type="currency">
            <text:p>￥2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57:.D61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formula="of:=SUM([.F57:.F61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61]/[.J61]" office:value-type="currency" office:currency="JPY" office:value="200" calcext:value-type="currency">
            <text:p>￥2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57:.D61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PM 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64])" office:value-type="currency" office:currency="JPY" office:value="400" calcext:value-type="currency">
            <text:p>￥400</text:p>
          </table:table-cell>
          <table:table-cell office:value-type="string" calcext:value-type="string">
            <text:p>(円)</text:p>
          </table:table-cell>
          <table:table-cell table:formula="of:=SUM([.F64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64]/[.J64]" office:value-type="currency" office:currency="JPY" office:value="133.333333333333" calcext:value-type="currency">
            <text:p>￥1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PM 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64:.D65])" office:value-type="currency" office:currency="JPY" office:value="900" calcext:value-type="currency">
            <text:p>￥900</text:p>
          </table:table-cell>
          <table:table-cell office:value-type="string" calcext:value-type="string">
            <text:p>(円)</text:p>
          </table:table-cell>
          <table:table-cell table:formula="of:=SUM([.F64:.F65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65]/[.J65]" office:value-type="currency" office:currency="JPY" office:value="150" calcext:value-type="currency">
            <text:p>￥1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PM -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64:.D66])" office:value-type="currency" office:currency="JPY" office:value="1500" calcext:value-type="currency">
            <text:p>￥1,500</text:p>
          </table:table-cell>
          <table:table-cell office:value-type="string" calcext:value-type="string">
            <text:p>(円)</text:p>
          </table:table-cell>
          <table:table-cell table:formula="of:=SUM([.F64:.F66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66]/[.J66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PM -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64:.D67])" office:value-type="currency" office:currency="JPY" office:value="2200" calcext:value-type="currency">
            <text:p>￥2,200</text:p>
          </table:table-cell>
          <table:table-cell office:value-type="string" calcext:value-type="string">
            <text:p>(円)</text:p>
          </table:table-cell>
          <table:table-cell table:formula="of:=SUM([.F64:.F67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67]/[.J67]" office:value-type="currency" office:currency="JPY" office:value="183.333333333333" calcext:value-type="currency">
            <text:p>￥18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木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64:.D68])" office:value-type="currency" office:currency="JPY" office:value="2200" calcext:value-type="currency">
            <text:p>￥2,200</text:p>
          </table:table-cell>
          <table:table-cell office:value-type="string" calcext:value-type="string">
            <text:p>(円)</text:p>
          </table:table-cell>
          <table:table-cell table:formula="of:=SUM([.F64:.F68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68]/[.J68]" office:value-type="currency" office:currency="JPY" office:value="183.333333333333" calcext:value-type="currency">
            <text:p>￥18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64:.D68])" office:value-type="currency" office:currency="JPY" office:value="2200" calcext:value-type="currency">
            <text:p>￥2,2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謎クエ合計</text:p>
          </table:table-cell>
          <table:table-cell table:style-name="ce7" table:formula="of:=[.D20]+[.D27]+[.D34]+[.D41]+[.D48]+[.D55]+[.D62]+[.D69]" office:value-type="currency" office:currency="JPY" office:value="16000" calcext:value-type="currency">
            <text:p>￥16,0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売上</text:p>
          </table:table-cell>
          <table:table-cell office:value-type="string" calcext:value-type="string">
            <text:p>月～木売上</text:p>
          </table:table-cell>
          <table:table-cell table:style-name="ce7" table:formula="of:=[.D12]+[.D71]" office:value-type="currency" office:currency="JPY" office:value="65180" calcext:value-type="currency">
            <text:p>￥65,18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月～木売上(追加)</text:p>
          </table:table-cell>
          <table:table-cell table:style-name="ce7" table:formula="of:=[.P12]+[.D71]" office:value-type="currency" office:currency="JPY" office:value="70340" calcext:value-type="currency">
            <text:p>￥70,34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office:value-type="string" calcext:value-type="string">
            <text:p>金～日</text:p>
          </table:table-cell>
          <table:table-cell/>
          <table:table-cell office:value-type="string" calcext:value-type="string">
            <text:p>稼働日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日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稼働時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時間/日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想定単価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跨ぎクエ</text:p>
          </table:table-cell>
          <table:table-cell office:value-type="string" calcext:value-type="string">
            <text:p>クエスト件数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回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件数（追加）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回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日当たりの目標件数</text:p>
          </table:table-cell>
          <table:table-cell table:style-name="ce5" table:formula="of:=[.D82]/[.D77]" office:value-type="float" office:value="30" calcext:value-type="float">
            <text:p>30.0</text:p>
          </table:table-cell>
          <table:table-cell office:value-type="string" calcext:value-type="string">
            <text:p>(回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1日当たりの目標件数(追加)</text:p>
          </table:table-cell>
          <table:table-cell table:style-name="ce5" table:formula="of:=([.D82]+[.P82])/[.D77]" office:value-type="float" office:value="35" calcext:value-type="float">
            <text:p>35.0</text:p>
          </table:table-cell>
          <table:table-cell table:style-name="ce1" office:value-type="string" calcext:value-type="string">
            <text:p>(回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ペース</text:p>
          </table:table-cell>
          <table:table-cell table:style-name="ce6" table:formula="of:=[.D83]/[.D78]" office:value-type="float" office:value="2.5" calcext:value-type="float">
            <text:p>2.5</text:p>
          </table:table-cell>
          <table:table-cell office:value-type="string" calcext:value-type="string">
            <text:p>(回/時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ペース（追加）</text:p>
          </table:table-cell>
          <table:table-cell table:style-name="ce6" table:formula="of:=([.D82]+[.P82])/[.D78]" office:value-type="float" office:value="5.83333333333333" calcext:value-type="float">
            <text:p>5.8</text:p>
          </table:table-cell>
          <table:table-cell table:style-name="ce1" office:value-type="string" calcext:value-type="string">
            <text:p>(回/時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クエスト報酬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報酬(追加)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配達報酬</text:p>
          </table:table-cell>
          <table:table-cell table:style-name="ce7" table:formula="of:=[.D79]*[.D82]" office:value-type="currency" office:currency="JPY" office:value="19200" calcext:value-type="currency">
            <text:p>￥19,2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配達報酬(追加)</text:p>
          </table:table-cell>
          <table:table-cell table:style-name="ce7" table:formula="of:=[.D79]*([.D82]+[.P82])" office:value-type="currency" office:currency="JPY" office:value="22400" calcext:value-type="currency">
            <text:p>￥22,40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クエスト込み報酬</text:p>
          </table:table-cell>
          <table:table-cell table:style-name="ce7" table:formula="of:=[.D86]+[.D85]" office:value-type="currency" office:currency="JPY" office:value="28840" calcext:value-type="currency">
            <text:p>￥28,84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クエスト込み報酬(追加)</text:p>
          </table:table-cell>
          <table:table-cell table:style-name="ce7" table:formula="of:=[.P86]+[.D85]+[.P85]" office:value-type="currency" office:currency="JPY" office:value="33040" calcext:value-type="currency">
            <text:p>￥33,04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謎クエ</text:p>
          </table:table-cell>
          <table:table-cell office:value-type="string" calcext:value-type="string">
            <text:p>金AM 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円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SUM([.D90])" office:value-type="currency" office:currency="JPY" office:value="1000" calcext:value-type="currency">
            <text:p>￥1,000</text:p>
          </table:table-cell>
          <table:table-cell office:value-type="string" calcext:value-type="string">
            <text:p>(円)</text:p>
          </table:table-cell>
          <table:table-cell table:formula="of:=SUM([.F90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90]/[.J90]" office:value-type="currency" office:currency="JPY" office:value="166.666666666667" calcext:value-type="currency">
            <text:p>￥1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AM -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90:.D91])" office:value-type="currency" office:currency="JPY" office:value="1650" calcext:value-type="currency">
            <text:p>￥1,650</text:p>
          </table:table-cell>
          <table:table-cell office:value-type="string" calcext:value-type="string">
            <text:p>(円)</text:p>
          </table:table-cell>
          <table:table-cell table:formula="of:=SUM([.F90:.F91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91]/[.J91]" office:value-type="currency" office:currency="JPY" office:value="183.333333333333" calcext:value-type="currency">
            <text:p>￥18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AM -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90:.D92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formula="of:=SUM([.F90:.F92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92]/[.J92]" office:value-type="currency" office:currency="JPY" office:value="200" calcext:value-type="currency">
            <text:p>￥2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A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0:.D93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formula="of:=SUM([.F90:.F93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93]/[.J93]" office:value-type="currency" office:currency="JPY" office:value="200" calcext:value-type="currency">
            <text:p>￥2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0:.D94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formula="of:=SUM([.F90:.F94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94]/[.J94]" office:value-type="currency" office:currency="JPY" office:value="200" calcext:value-type="currency">
            <text:p>￥20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90:.D94])" office:value-type="currency" office:currency="JPY" office:value="2400" calcext:value-type="currency">
            <text:p>￥2,4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PM 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97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97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97]/[.J97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PM 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7:.D98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97:.F98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98]/[.J98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PM 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7:.D99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97:.F99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99]/[.J99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P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7:.D100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97:.F100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00]/[.J100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金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97:.D101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97:.F101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01]/[.J101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97:.D101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AM -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(円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SUM([.D104])" office:value-type="currency" office:currency="JPY" office:value="1400" calcext:value-type="currency">
            <text:p>￥1,400</text:p>
          </table:table-cell>
          <table:table-cell office:value-type="string" calcext:value-type="string">
            <text:p>(円)</text:p>
          </table:table-cell>
          <table:table-cell table:formula="of:=SUM([.F104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104]/[.J104]" office:value-type="currency" office:currency="JPY" office:value="233.333333333333" calcext:value-type="currency">
            <text:p>￥233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AM -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04:.D105])" office:value-type="currency" office:currency="JPY" office:value="2250" calcext:value-type="currency">
            <text:p>￥2,250</text:p>
          </table:table-cell>
          <table:table-cell office:value-type="string" calcext:value-type="string">
            <text:p>(円)</text:p>
          </table:table-cell>
          <table:table-cell table:formula="of:=SUM([.F104:.F105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105]/[.J105]" office:value-type="currency" office:currency="JPY" office:value="250" calcext:value-type="currency">
            <text:p>￥25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AM -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04:.D106])" office:value-type="currency" office:currency="JPY" office:value="3200" calcext:value-type="currency">
            <text:p>￥3,200</text:p>
          </table:table-cell>
          <table:table-cell office:value-type="string" calcext:value-type="string">
            <text:p>(円)</text:p>
          </table:table-cell>
          <table:table-cell table:formula="of:=SUM([.F104:.F106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06]/[.J106]" office:value-type="currency" office:currency="JPY" office:value="266.666666666667" calcext:value-type="currency">
            <text:p>￥2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A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04:.D107])" office:value-type="currency" office:currency="JPY" office:value="3200" calcext:value-type="currency">
            <text:p>￥3,200</text:p>
          </table:table-cell>
          <table:table-cell office:value-type="string" calcext:value-type="string">
            <text:p>(円)</text:p>
          </table:table-cell>
          <table:table-cell table:formula="of:=SUM([.F104:.F107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07]/[.J107]" office:value-type="currency" office:currency="JPY" office:value="266.666666666667" calcext:value-type="currency">
            <text:p>￥2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04:.D108])" office:value-type="currency" office:currency="JPY" office:value="3200" calcext:value-type="currency">
            <text:p>￥3,200</text:p>
          </table:table-cell>
          <table:table-cell office:value-type="string" calcext:value-type="string">
            <text:p>(円)</text:p>
          </table:table-cell>
          <table:table-cell table:formula="of:=SUM([.F104:.F108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08]/[.J108]" office:value-type="currency" office:currency="JPY" office:value="266.666666666667" calcext:value-type="currency">
            <text:p>￥267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104:.D108])" office:value-type="currency" office:currency="JPY" office:value="3200" calcext:value-type="currency">
            <text:p>￥3,2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PM 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1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1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11]/[.J111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PM 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1:.D112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1:.F112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112]/[.J112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PM 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1:.D113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1:.F113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113]/[.J113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P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1:.D114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1:.F114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14]/[.J114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土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11:.D115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1:.F115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15]/[.J115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111:.D115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AM 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8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8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18]/[.J118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AM 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8:.D119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8:.F119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119]/[.J119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AM 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8:.D120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8:.F120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120]/[.J120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A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18:.D121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8:.F121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21]/[.J121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A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18:.D122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18:.F122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22]/[.J122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118:.D122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PM 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25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25])"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[.H125]/[.J125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PM 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25:.D126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25:.F126])" office:value-type="float" office:value="6" calcext:value-type="float">
            <text:p>6</text:p>
          </table:table-cell>
          <table:table-cell office:value-type="string" calcext:value-type="string">
            <text:p>(回)</text:p>
          </table:table-cell>
          <table:table-cell table:formula="of:=[.H126]/[.J126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PM 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25:.D127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25:.F127])" office:value-type="float" office:value="9" calcext:value-type="float">
            <text:p>9</text:p>
          </table:table-cell>
          <table:table-cell office:value-type="string" calcext:value-type="string">
            <text:p>(回)</text:p>
          </table:table-cell>
          <table:table-cell table:formula="of:=[.H127]/[.J127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PM 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回)</text:p>
          </table:table-cell>
          <table:table-cell table:formula="of:=SUM([.D125:.D128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25:.F128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28]/[.J128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日PM 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円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回)</text:p>
          </table:table-cell>
          <table:table-cell table:formula="of:=SUM([.D125:.D129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formula="of:=SUM([.F125:.F129])" office:value-type="float" office:value="12" calcext:value-type="float">
            <text:p>12</text:p>
          </table:table-cell>
          <table:table-cell office:value-type="string" calcext:value-type="string">
            <text:p>(回)</text:p>
          </table:table-cell>
          <table:table-cell table:formula="of:=[.H129]/[.J129]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クエスト報酬合計</text:p>
          </table:table-cell>
          <table:table-cell table:style-name="ce7" table:formula="of:=SUM([.D125:.D129])" office:value-type="currency" office:currency="JPY" office:value="0" calcext:value-type="currency">
            <text:p>￥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謎クエ合計</text:p>
          </table:table-cell>
          <table:table-cell table:style-name="ce7" table:formula="of:=[.D95]+[.D102]+[.D109]+[.D116]+[.D123]+[.D130]" office:value-type="currency" office:currency="JPY" office:value="5600" calcext:value-type="currency">
            <text:p>￥5,60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売上</text:p>
          </table:table-cell>
          <table:table-cell office:value-type="string" calcext:value-type="string">
            <text:p>金～日売上</text:p>
          </table:table-cell>
          <table:table-cell table:style-name="ce7" table:formula="of:=[.D87]+[.D132]" office:value-type="currency" office:currency="JPY" office:value="34440" calcext:value-type="currency">
            <text:p>￥34,44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金～日売上(追加)</text:p>
          </table:table-cell>
          <table:table-cell table:style-name="ce7" table:formula="of:=[.P87]+[.D132]" office:value-type="currency" office:currency="JPY" office:value="38640" calcext:value-type="currency">
            <text:p>￥38,64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>
          <table:table-cell office:value-type="string" calcext:value-type="string">
            <text:p>週間売上</text:p>
          </table:table-cell>
          <table:table-cell/>
          <table:table-cell office:value-type="string" calcext:value-type="string">
            <text:p>週間売上</text:p>
          </table:table-cell>
          <table:table-cell table:style-name="ce7" table:formula="of:=[.D74]+[.D135]" office:value-type="currency" office:currency="JPY" office:value="99620" calcext:value-type="currency">
            <text:p>￥99,620</text:p>
          </table:table-cell>
          <table:table-cell office:value-type="string" calcext:value-type="string">
            <text:p>(円)</text:p>
          </table:table-cell>
          <table:table-cell table:style-name="Default" table:number-columns-repeated="8"/>
          <table:table-cell/>
          <table:table-cell table:style-name="ce1" office:value-type="string" calcext:value-type="string">
            <text:p>週間売上(追加)</text:p>
          </table:table-cell>
          <table:table-cell table:style-name="ce7" table:formula="of:=[.P74]+[.P135]" office:value-type="currency" office:currency="JPY" office:value="108980" calcext:value-type="currency">
            <text:p>￥108,980</text:p>
          </table:table-cell>
          <table:table-cell table:style-name="ce1" office:value-type="string" calcext:value-type="string">
            <text:p>(円)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1" table:default-cell-style-name="ce8"/>
        <table:table-column table:style-name="co6" table:default-cell-style-name="ce1"/>
        <table:table-column table:style-name="co9" table:default-cell-style-name="ce8"/>
        <table:table-column table:style-name="co12" table:default-cell-style-name="ce1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跨ぎクエ</text:p>
          </table:table-cell>
          <table:table-cell table:style-name="Default" table:number-columns-repeated="6"/>
          <table:table-cell/>
          <table:table-cell office:value-type="string" calcext:value-type="string">
            <text:p>雨クエ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月～木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回数</text:p>
          </table:table-cell>
          <table:table-cell/>
          <table:table-cell table:style-name="ce1" office:value-type="string" calcext:value-type="string">
            <text:p>金額</text:p>
          </table:table-cell>
          <table:table-cell/>
          <table:table-cell table:style-name="ce1" office:value-type="string" calcext:value-type="string">
            <text:p>単価</text:p>
          </table:table-cell>
          <table:table-cell table:number-columns-repeated="17"/>
          <table:table-cell office:value-type="string" calcext:value-type="string">
            <text:p>開始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タイムリミット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2120" calcext:value-type="currency">
            <text:p>￥22,120</text:p>
          </table:table-cell>
          <table:table-cell office:value-type="string" calcext:value-type="string">
            <text:p>(円)</text:p>
          </table:table-cell>
          <table:table-cell table:formula="of:=[.D4]/[.B4]" office:value-type="currency" office:currency="JPY" office:value="170.153846153846" calcext:value-type="currency">
            <text:p>￥170</text:p>
          </table:table-cell>
          <table:table-cell office:value-type="string" calcext:value-type="string">
            <text:p>(円/回)</text:p>
          </table:table-cell>
          <table:table-cell table:number-columns-repeated="16"/>
          <table:table-cell table:style-name="ce12" office:value-type="time" office:time-value="PT05H00M00S" calcext:value-type="time">
            <text:p>05:00:00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4" table:formula="of:=[.Y4]-[.X4]" office:value-type="time" office:time-value="PT05H30M00S" calcext:value-type="time">
            <text:p>05:30: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1120" calcext:value-type="currency">
            <text:p>￥21,120</text:p>
          </table:table-cell>
          <table:table-cell office:value-type="string" calcext:value-type="string">
            <text:p>(円)</text:p>
          </table:table-cell>
          <table:table-cell table:formula="of:=[.D5]/[.B5]" office:value-type="currency" office:currency="JPY" office:value="176" calcext:value-type="currency">
            <text:p>￥176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9140" calcext:value-type="currency">
            <text:p>￥19,140</text:p>
          </table:table-cell>
          <table:table-cell office:value-type="string" calcext:value-type="string">
            <text:p>(円)</text:p>
          </table:table-cell>
          <table:table-cell table:formula="of:=[.D6]/[.B6]" office:value-type="currency" office:currency="JPY" office:value="174" calcext:value-type="currency">
            <text:p>￥174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string" calcext:value-type="string">
            <text:p>段階</text:p>
          </table:table-cell>
          <table:table-cell table:style-name="ce1" office:value-type="string" calcext:value-type="string">
            <text:p>回数</text:p>
          </table:table-cell>
          <table:table-cell table:style-name="ce1" table:number-columns-repeated="3"/>
          <table:table-cell table:style-name="ce1" office:value-type="string" calcext:value-type="string">
            <text:p>金額</text:p>
          </table:table-cell>
          <table:table-cell table:style-name="ce1"/>
          <table:table-cell table:style-name="ce1" office:value-type="string" calcext:value-type="string">
            <text:p>累積金額</text:p>
          </table:table-cell>
          <table:table-cell table:style-name="ce1"/>
          <table:table-cell table:style-name="ce1" office:value-type="string" calcext:value-type="string">
            <text:p>累積件数</text:p>
          </table:table-cell>
          <table:table-cell table:style-name="ce1"/>
          <table:table-cell table:style-name="ce1" office:value-type="string" calcext:value-type="string">
            <text:p>単価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7180" calcext:value-type="currency">
            <text:p>￥17,180</text:p>
          </table:table-cell>
          <table:table-cell office:value-type="string" calcext:value-type="string">
            <text:p>(円)</text:p>
          </table:table-cell>
          <table:table-cell table:formula="of:=[.D7]/[.B7]" office:value-type="currency" office:currency="JPY" office:value="171.8" calcext:value-type="currency">
            <text:p>￥172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(回)</text:p>
          </table:table-cell>
          <table:table-cell table:style-name="ce1"/>
          <table:table-cell table:style-name="ce8" office:value-type="currency" office:currency="JPY" office:value="1200" calcext:value-type="currency">
            <text:p>￥1,2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O7]" office:value-type="currency" office:currency="JPY" office:value="1200" calcext:value-type="currency">
            <text:p>￥1,200</text:p>
          </table:table-cell>
          <table:table-cell table:style-name="ce1" office:value-type="string" calcext:value-type="string">
            <text:p>(円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7]/[.S7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7]/([.$Z$4]*24)" office:value-type="float" office:value="0.545454545454545" calcext:value-type="float">
            <text:p>0.5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5260" calcext:value-type="currency">
            <text:p>￥15,260</text:p>
          </table:table-cell>
          <table:table-cell office:value-type="string" calcext:value-type="string">
            <text:p>(円)</text:p>
          </table:table-cell>
          <table:table-cell table:formula="of:=[.D8]/[.B8]" office:value-type="currency" office:currency="JPY" office:value="169.555555555556" calcext:value-type="currency">
            <text:p>￥170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7]+[.O8]" office:value-type="currency" office:currency="JPY" office:value="1600" calcext:value-type="currency">
            <text:p>￥1,6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8])" office:value-type="float" office:value="4" calcext:value-type="float">
            <text:p>4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8]/[.S8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8]/([.$Z$4]*24)" office:value-type="float" office:value="0.727272727272727" calcext:value-type="float">
            <text:p>0.7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3350" calcext:value-type="currency">
            <text:p>￥13,350</text:p>
          </table:table-cell>
          <table:table-cell office:value-type="string" calcext:value-type="string">
            <text:p>(円)</text:p>
          </table:table-cell>
          <table:table-cell table:formula="of:=[.D9]/[.B9]" office:value-type="currency" office:currency="JPY" office:value="166.875" calcext:value-type="currency">
            <text:p>￥167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8]+[.O9]" office:value-type="currency" office:currency="JPY" office:value="2000" calcext:value-type="currency">
            <text:p>￥2,0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9])" office:value-type="float" office:value="5" calcext:value-type="float">
            <text:p>5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9]/[.S9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9]/([.$Z$4]*24)" office:value-type="float" office:value="0.909090909090909" calcext:value-type="float">
            <text:p>0.9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1480" calcext:value-type="currency">
            <text:p>￥11,480</text:p>
          </table:table-cell>
          <table:table-cell office:value-type="string" calcext:value-type="string">
            <text:p>(円)</text:p>
          </table:table-cell>
          <table:table-cell table:formula="of:=[.D10]/[.B10]" office:value-type="currency" office:currency="JPY" office:value="164" calcext:value-type="currency">
            <text:p>￥164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9]+[.O10]" office:value-type="currency" office:currency="JPY" office:value="2400" calcext:value-type="currency">
            <text:p>￥2,4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0])" office:value-type="float" office:value="6" calcext:value-type="float">
            <text:p>6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0]/[.S10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0]/([.$Z$4]*24)" office:value-type="float" office:value="1.09090909090909" calcext:value-type="float">
            <text:p>1.1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9640" calcext:value-type="currency">
            <text:p>￥9,640</text:p>
          </table:table-cell>
          <table:table-cell office:value-type="string" calcext:value-type="string">
            <text:p>(円)</text:p>
          </table:table-cell>
          <table:table-cell table:formula="of:=[.D11]/[.B11]" office:value-type="currency" office:currency="JPY" office:value="160.666666666667" calcext:value-type="currency">
            <text:p>￥161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0]+[.O11]" office:value-type="currency" office:currency="JPY" office:value="2800" calcext:value-type="currency">
            <text:p>￥2,8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1])" office:value-type="float" office:value="7" calcext:value-type="float">
            <text:p>7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1]/[.S11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1]/([.$Z$4]*24)" office:value-type="float" office:value="1.27272727272727" calcext:value-type="float">
            <text:p>1.3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7840" calcext:value-type="currency">
            <text:p>￥7,840</text:p>
          </table:table-cell>
          <table:table-cell office:value-type="string" calcext:value-type="string">
            <text:p>(円)</text:p>
          </table:table-cell>
          <table:table-cell table:formula="of:=[.D12]/[.B12]" office:value-type="currency" office:currency="JPY" office:value="156.8" calcext:value-type="currency">
            <text:p>￥157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1]+[.O12]" office:value-type="currency" office:currency="JPY" office:value="3200" calcext:value-type="currency">
            <text:p>￥3,2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2])" office:value-type="float" office:value="8" calcext:value-type="float">
            <text:p>8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2]/[.S12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2]/([.$Z$4]*24)" office:value-type="float" office:value="1.45454545454545" calcext:value-type="float">
            <text:p>1.5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6080" calcext:value-type="currency">
            <text:p>￥6,080</text:p>
          </table:table-cell>
          <table:table-cell office:value-type="string" calcext:value-type="string">
            <text:p>(円)</text:p>
          </table:table-cell>
          <table:table-cell table:formula="of:=[.D13]/[.B13]" office:value-type="currency" office:currency="JPY" office:value="152" calcext:value-type="currency">
            <text:p>￥152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2]+[.O13]" office:value-type="currency" office:currency="JPY" office:value="3600" calcext:value-type="currency">
            <text:p>￥3,6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3])" office:value-type="float" office:value="9" calcext:value-type="float">
            <text:p>9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3]/[.S13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3]/([.$Z$4]*24)" office:value-type="float" office:value="1.63636363636364" calcext:value-type="float">
            <text:p>1.6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4380" calcext:value-type="currency">
            <text:p>￥4,380</text:p>
          </table:table-cell>
          <table:table-cell office:value-type="string" calcext:value-type="string">
            <text:p>(円)</text:p>
          </table:table-cell>
          <table:table-cell table:formula="of:=[.D14]/[.B14]" office:value-type="currency" office:currency="JPY" office:value="146" calcext:value-type="currency">
            <text:p>￥146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3]+[.O14]" office:value-type="currency" office:currency="JPY" office:value="4000" calcext:value-type="currency">
            <text:p>￥4,0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M14])" office:value-type="float" office:value="10" calcext:value-type="float">
            <text:p>10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4]/[.S14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4]/([.$Z$4]*24)" office:value-type="float" office:value="1.81818181818182" calcext:value-type="float">
            <text:p>1.8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730" calcext:value-type="currency">
            <text:p>￥2,730</text:p>
          </table:table-cell>
          <table:table-cell office:value-type="string" calcext:value-type="string">
            <text:p>(円)</text:p>
          </table:table-cell>
          <table:table-cell table:formula="of:=[.D15]/[.B15]" office:value-type="currency" office:currency="JPY" office:value="136.5" calcext:value-type="currency">
            <text:p>￥137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4]+[.O15]" office:value-type="currency" office:currency="JPY" office:value="4400" calcext:value-type="currency">
            <text:p>￥4,4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5])" office:value-type="float" office:value="11" calcext:value-type="float">
            <text:p>11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5]/[.S15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5]/([.$Z$4]*24)" office:value-type="float" office:value="2" calcext:value-type="float">
            <text:p>2.0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[.D16]/[.B16]" office:value-type="currency" office:currency="JPY" office:value="80" calcext:value-type="currency">
            <text:p>￥80</text:p>
          </table:table-cell>
          <table:table-cell office:value-type="string" calcext:value-type="string">
            <text:p>(円/回)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回)</text:p>
          </table:table-cell>
          <table:table-cell table:style-name="ce11" office:value-type="string" calcext:value-type="string">
            <text:p>+</text:p>
          </table:table-cell>
          <table:table-cell table:style-name="ce8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)</text:p>
          </table:table-cell>
          <table:table-cell table:style-name="ce8" table:formula="of:=[.Q15]+[.O16]" office:value-type="currency" office:currency="JPY" office:value="4800" calcext:value-type="currency">
            <text:p>￥4,800</text:p>
          </table:table-cell>
          <table:table-cell table:style-name="ce1" office:value-type="string" calcext:value-type="string">
            <text:p>(円)</text:p>
          </table:table-cell>
          <table:table-cell table:style-name="ce1" table:formula="of:=SUM([.L7:.L16])" office:value-type="float" office:value="12" calcext:value-type="float">
            <text:p>12</text:p>
          </table:table-cell>
          <table:table-cell table:style-name="ce1" office:value-type="string" calcext:value-type="string">
            <text:p>(回)</text:p>
          </table:table-cell>
          <table:table-cell table:style-name="ce8" table:formula="of:=[.Q16]/[.S16]" office:value-type="currency" office:currency="JPY" office:value="400" calcext:value-type="currency">
            <text:p>￥400</text:p>
          </table:table-cell>
          <table:table-cell table:style-name="ce1" office:value-type="string" calcext:value-type="string">
            <text:p>(円/回)</text:p>
          </table:table-cell>
          <table:table-cell/>
          <table:table-cell table:style-name="ce13" table:formula="of:=[.S16]/([.$Z$4]*24)" office:value-type="float" office:value="2.18181818181818" calcext:value-type="float">
            <text:p>2.2</text:p>
          </table:table-cell>
          <table:table-cell office:value-type="string" calcext:value-type="string">
            <text:p>(回/時)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金～日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回数</text:p>
          </table:table-cell>
          <table:table-cell/>
          <table:table-cell table:style-name="ce1" office:value-type="string" calcext:value-type="string">
            <text:p>金額</text:p>
          </table:table-cell>
          <table:table-cell/>
          <table:table-cell table:style-name="ce1" office:value-type="string" calcext:value-type="string">
            <text:p>単価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2120" calcext:value-type="currency">
            <text:p>￥22,120</text:p>
          </table:table-cell>
          <table:table-cell office:value-type="string" calcext:value-type="string">
            <text:p>(円)</text:p>
          </table:table-cell>
          <table:table-cell table:formula="of:=[.D21]/[.B21]" office:value-type="currency" office:currency="JPY" office:value="170.153846153846" calcext:value-type="currency">
            <text:p>￥170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1120" calcext:value-type="currency">
            <text:p>￥21,120</text:p>
          </table:table-cell>
          <table:table-cell office:value-type="string" calcext:value-type="string">
            <text:p>(円)</text:p>
          </table:table-cell>
          <table:table-cell table:formula="of:=[.D22]/[.B22]" office:value-type="currency" office:currency="JPY" office:value="176" calcext:value-type="currency">
            <text:p>￥176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9140" calcext:value-type="currency">
            <text:p>￥19,140</text:p>
          </table:table-cell>
          <table:table-cell office:value-type="string" calcext:value-type="string">
            <text:p>(円)</text:p>
          </table:table-cell>
          <table:table-cell table:formula="of:=[.D23]/[.B23]" office:value-type="currency" office:currency="JPY" office:value="174" calcext:value-type="currency">
            <text:p>￥174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7180" calcext:value-type="currency">
            <text:p>￥17,180</text:p>
          </table:table-cell>
          <table:table-cell office:value-type="string" calcext:value-type="string">
            <text:p>(円)</text:p>
          </table:table-cell>
          <table:table-cell table:formula="of:=[.D24]/[.B24]" office:value-type="currency" office:currency="JPY" office:value="171.8" calcext:value-type="currency">
            <text:p>￥172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5260" calcext:value-type="currency">
            <text:p>￥15,260</text:p>
          </table:table-cell>
          <table:table-cell office:value-type="string" calcext:value-type="string">
            <text:p>(円)</text:p>
          </table:table-cell>
          <table:table-cell table:formula="of:=[.D25]/[.B25]" office:value-type="currency" office:currency="JPY" office:value="169.555555555556" calcext:value-type="currency">
            <text:p>￥170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3350" calcext:value-type="currency">
            <text:p>￥13,350</text:p>
          </table:table-cell>
          <table:table-cell office:value-type="string" calcext:value-type="string">
            <text:p>(円)</text:p>
          </table:table-cell>
          <table:table-cell table:formula="of:=[.D26]/[.B26]" office:value-type="currency" office:currency="JPY" office:value="166.875" calcext:value-type="currency">
            <text:p>￥167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11480" calcext:value-type="currency">
            <text:p>￥11,480</text:p>
          </table:table-cell>
          <table:table-cell office:value-type="string" calcext:value-type="string">
            <text:p>(円)</text:p>
          </table:table-cell>
          <table:table-cell table:formula="of:=[.D27]/[.B27]" office:value-type="currency" office:currency="JPY" office:value="164" calcext:value-type="currency">
            <text:p>￥164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9640" calcext:value-type="currency">
            <text:p>￥9,640</text:p>
          </table:table-cell>
          <table:table-cell office:value-type="string" calcext:value-type="string">
            <text:p>(円)</text:p>
          </table:table-cell>
          <table:table-cell table:formula="of:=[.D28]/[.B28]" office:value-type="currency" office:currency="JPY" office:value="160.666666666667" calcext:value-type="currency">
            <text:p>￥161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7840" calcext:value-type="currency">
            <text:p>￥7,840</text:p>
          </table:table-cell>
          <table:table-cell office:value-type="string" calcext:value-type="string">
            <text:p>(円)</text:p>
          </table:table-cell>
          <table:table-cell table:formula="of:=[.D29]/[.B29]" office:value-type="currency" office:currency="JPY" office:value="156.8" calcext:value-type="currency">
            <text:p>￥157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6080" calcext:value-type="currency">
            <text:p>￥6,080</text:p>
          </table:table-cell>
          <table:table-cell office:value-type="string" calcext:value-type="string">
            <text:p>(円)</text:p>
          </table:table-cell>
          <table:table-cell table:formula="of:=[.D30]/[.B30]" office:value-type="currency" office:currency="JPY" office:value="152" calcext:value-type="currency">
            <text:p>￥152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4380" calcext:value-type="currency">
            <text:p>￥4,380</text:p>
          </table:table-cell>
          <table:table-cell office:value-type="string" calcext:value-type="string">
            <text:p>(円)</text:p>
          </table:table-cell>
          <table:table-cell table:formula="of:=[.D31]/[.B31]" office:value-type="currency" office:currency="JPY" office:value="146" calcext:value-type="currency">
            <text:p>￥146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2730" calcext:value-type="currency">
            <text:p>￥2,730</text:p>
          </table:table-cell>
          <table:table-cell office:value-type="string" calcext:value-type="string">
            <text:p>(円)</text:p>
          </table:table-cell>
          <table:table-cell table:formula="of:=[.D32]/[.B32]" office:value-type="currency" office:currency="JPY" office:value="136.5" calcext:value-type="currency">
            <text:p>￥137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(回)</text:p>
          </table:table-cell>
          <table:table-cell office:value-type="currency" office:currency="JPY" office:value="800" calcext:value-type="currency">
            <text:p>￥800</text:p>
          </table:table-cell>
          <table:table-cell office:value-type="string" calcext:value-type="string">
            <text:p>(円)</text:p>
          </table:table-cell>
          <table:table-cell table:formula="of:=[.D33]/[.B33]" office:value-type="currency" office:currency="JPY" office:value="80" calcext:value-type="currency">
            <text:p>￥80</text:p>
          </table:table-cell>
          <table:table-cell office:value-type="string" calcext:value-type="string">
            <text:p>(円/回)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00/00/00</text:date>, <text:time style:data-style-name="N2" text:time-value="23:30:38.010913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03:23:10.280406400</meta:creation-date>
    <dc:date>2026-06-15T00:37:55.889669600</dc:date>
    <meta:editing-duration>PT17M33S</meta:editing-duration>
    <meta:editing-cycles>3</meta:editing-cycles>
    <meta:generator>LibreOffice/25.8.6.2$Windows_X86_64 LibreOffice_project/b4b39682cd9868fa725bc664aff94278d315bd04</meta:generator>
    <meta:document-statistic meta:table-count="2" meta:cell-count="1266" meta:object-count="0"/>
  </office:meta>
</office:document-meta>
</file>